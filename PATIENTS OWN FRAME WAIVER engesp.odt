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w Cen MT" svg:font-family="'Tw Cen MT'" style:font-adornments="Bold" style:font-family-generic="swiss" style:font-pitch="variable"/>
    <style:font-face style:name="Tw Cen MT Condensed Extra Bold" svg:font-family="'Tw Cen MT Condensed Extra Bold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w Cen MT" fo:font-size="13pt" officeooo:paragraph-rsid="001a5728" style:font-size-asian="13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ICE REGARDING PATIENT'S OWN FRAME<text:line-break/>AVISO SOBRE LA MONTURA DEL PACIENTE<text:line-break/>Conditions of Service / Condiciones del Servicio:</text:span><text:line-break/><text:line-break/><text:span text:style-name="T1">No Warranty</text:span>: I acknowledge that my frame is not new and is not covered by a warranty.<text:line-break/>(<text:span text:style-name="T1">Sin Garantía</text:span>: Reconozco que mi montura no es nueva y no está cubierta por garantía.)<text:line-break/><text:line-break/><text:span text:style-name="T1">Release of Liability</text:span>: I understand that neither the Provider nor PAL Optical is responsible for breakage, damage, or loss during shipping or laboratory processing.<text:line-break/>(<text:span text:style-name="T1">Exención de Responsabilidad</text:span>: Entiendo que ni el Proveedor ni PAL Optical son responsables por roturas, daños o pérdidas durante el envío o el procesamiento en el laboratorio.)<text:line-break/><text:line-break/><text:span text:style-name="T1">Financial Responsibility</text:span>: In the event of breakage or loss, I agree to pay all replacement costs, shipping fees, and lens expenses.<text:line-break/>(<text:span text:style-name="T1">Responsabilidad Financiera</text:span>: En caso de rotura o pérdida, acepto pagar todos los costos de reemplazo, envío y gastos de lentes.)<text:line-break/><text:line-break/>By signing below, I acknowledge that I have read and agreed to these terms.<text:line-break/>(Al firmar abajo, reconozco que he leído y aceptado estos términos.)<text:line-break/><text:line-break/>X________________________________________ <text:s text:c="2"/>Date: __________<text:line-break/>Patient Signature (Firma del Paciente)<text:line-break/><text:line-break/>X________________________________________ <text:s text:c="2"/>Date: __________<text:line-break/>Provider Signature (Firma del Proveedor)<text:line-break/><text:line-break/>-------------------------------------------------------------------------------------------------------------------------<text:line-break/><text:line-break/><text:span text:style-name="T1">NOTICE REGARDING PATIENT'S OWN FRAME<text:line-break/>AVISO SOBRE LA MONTURA DEL PACIENTE<text:line-break/>Conditions of Service / Condiciones del Servicio:</text:span><text:line-break/><text:line-break/><text:span text:style-name="T1">No Warranty</text:span>: I acknowledge that my frame is not new and is not covered by a warranty.<text:line-break/>(<text:span text:style-name="T1">Sin Garantía</text:span>: Reconozco que mi montura no es nueva y no está cubierta por garantía.)<text:line-break/><text:line-break/><text:span text:style-name="T1">Release of Liability</text:span>: I understand that neither the Provider nor PAL Optical is responsible for breakage, damage, or loss during shipping or laboratory processing.<text:line-break/>(<text:span text:style-name="T1">Exención de Responsabilidad</text:span>: Entiendo que ni el Proveedor ni PAL Optical son responsables por roturas, daños o pérdidas durante el envío o el procesamiento en el laboratorio.)<text:line-break/><text:line-break/><text:span text:style-name="T1">Financial Responsibility</text:span>: In the event of breakage or loss, I agree to pay all replacement costs, shipping fees, and lens expenses.<text:line-break/>(<text:span text:style-name="T1">Responsabilidad Financiera</text:span>: En caso de rotura o pérdida, acepto pagar todos los costos de reemplazo, envío y gastos de lentes.)<text:line-break/><text:line-break/>By signing below, I acknowledge that I have read and agreed to these terms.<text:line-break/>(Al firmar abajo, reconozco que he leído y aceptado estos términos.)<text:line-break/><text:line-break/>X________________________________________ <text:s text:c="2"/>Date: __________<text:line-break/>Patient Signature (Firma del Paciente)<text:line-break/><text:line-break/>X________________________________________ <text:s text:c="2"/>Date: __________<text:line-break/>Provider Signature (Firma del Proveedo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w Cen MT" svg:font-family="'Tw Cen MT'" style:font-adornments="Bold" style:font-family-generic="swiss" style:font-pitch="variable"/>
    <style:font-face style:name="Tw Cen MT Condensed Extra Bold" svg:font-family="'Tw Cen MT Condensed Extra Bold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w Cen MT Condensed Extra Bold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w Cen MT Condensed Extra Bold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w Cen MT Condensed Extra Bold" fo:font-family="'Tw Cen MT Condensed Extra Bold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w Cen MT Condensed Extra Bold" fo:font-family="'Tw Cen MT Condensed Extra Bold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w Cen MT Condensed Extra Bold" fo:font-family="'Tw Cen MT Condensed Extra Bold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w Cen MT Condensed Extra Bold" fo:font-family="'Tw Cen MT Condensed Extra Bold'"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25in" style:writing-mode="lr-tb" style:footnote-max-height="0in" loext:margin-gutter="0.25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0:02:20.402251200</meta:creation-date>
    <dc:date>2026-02-24T10:09:12.118624200</dc:date>
    <meta:editing-duration>PT6M52S</meta:editing-duration>
    <meta:editing-cycles>1</meta:editing-cycles>
    <meta:document-statistic meta:table-count="0" meta:image-count="0" meta:object-count="0" meta:page-count="1" meta:paragraph-count="1" meta:word-count="367" meta:character-count="2623" meta:non-whitespace-character-count="2235"/>
    <meta:generator>LibreOffice/25.8.1.1$Windows_X86_64 LibreOffice_project/54047653041915e595ad4e45cccea684809c77b5</meta:generator>
  </office:meta>
</office:document-meta>
</file>