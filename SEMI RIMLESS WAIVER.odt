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apple-system" svg:font-family="apple-system, BlinkMacSystemFont, 'Segoe UI', Roboto, 'Helvetica Neue', Arial, 'Apple Color Emoji', 'Segoe UI Emoji', 'Segoe UI Symbol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w Cen M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w Cen MT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w Cen MT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w Cen MT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w Cen MT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w Cen MT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w Cen MT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w Cen MT"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w Cen MT"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w Cen MT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w Cen MT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w Cen MT"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w Cen MT" fo:font-size="16pt" style:text-underline-style="none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fo:color="#333d42" style:font-name="apple-system" fo:font-size="10.5pt" fo:letter-spacing="normal" fo:font-style="normal" fo:font-weight="normal"/>
    </style:style>
    <style:style style:name="T5" style:family="text">
      <style:text-properties fo:font-variant="normal" fo:text-transform="none" fo:color="#333d42" fo:font-size="10.5pt" fo:letter-spacing="normal" fo:font-style="normal" fo:font-weight="normal"/>
    </style:style>
    <style:style style:name="T6" style:family="text">
      <style:text-properties fo:font-variant="normal" fo:text-transform="none" fo:color="#333d42" fo:letter-spacing="normal" fo:font-style="normal" fo:font-weight="normal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color="#e8e8e8" style:font-name="Roboto" fo:font-size="10.5pt" fo:letter-spacing="normal" fo:font-style="normal" fo:font-weight="normal"/>
    </style:style>
    <style:style style:name="T10" style:family="text">
      <style:text-properties fo:font-variant="normal" fo:text-transform="none" fo:color="#e8e8e8" style:font-name="Roboto" fo:font-size="10.5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e8e8e8" style:font-name="Roboto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variant="normal" fo:text-transform="none" fo:color="#e8e8e8" style:font-name="Tw Cen MT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variant="normal" fo:text-transform="none" fo:color="#e8e8e8" style:font-name="Tw Cen MT" fo:font-size="16pt" fo:letter-spacing="normal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000000" style:font-name="Tw Cen MT" fo:font-size="18pt" fo:letter-spacing="normal" fo:font-style="norma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000000" style:font-name="Tw Cen MT" fo:font-size="16pt" fo:letter-spacing="normal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6" style:family="text">
      <style:text-properties fo:color="#000000" style:font-name="Tw Cen MT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7" style:family="text">
      <style:text-properties fo:color="#000000" style:font-name="Tw Cen MT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Tw Cen MT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font-name="Tw Cen MT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L OPTICAL</text:p>
      <text:p text:style-name="P6"/>
      <text:p text:style-name="P6">SEMI RIMLESS IN PLASTIC WAIVER</text:p>
      <text:p text:style-name="P1"/>
      <text:p text:style-name="P2"><text:tab/><text:span text:style-name="T3">I HAVE BEEN CAUTIONED THAT MY TYPE OF FRAME SHOULD HAVE POLYCARBONATE LENSES DUE TO IT BEING SEMI-RIMLESS. AS I AM FORGOING POLYCARBONATE FOR PLASTIC LENSES I WILL NOT HOLD PAL OPTICAL RESPONSIBLE FOR ANY CHIPPING OR BREAKING THE LENS MIGHT DUE IF DROPPED OR OTHERWISE DAMAGED BY MYSELF. I AM ALSO FORGOING ANY REMAKES OR FRAME RESTYLES UNLESS OTHERWISE DICTATED BY MY INSURANCE.</text:span></text:p>
      <text:p text:style-name="P3"/>
      <text:p text:style-name="P4"/>
      <text:p text:style-name="P5">PATIENTS SIGNATURE: <text:span text:style-name="T1"><text:s text:c="38"/></text:span><text:s text:c="5"/>DATE: <text:span text:style-name="T1"><text:s text:c="5"/>/ <text:s text:c="4"/>/ <text:s text:c="7"/></text:span></text:p>
      <text:p text:style-name="P5"/>
      <text:p text:style-name="P5">OPTICIAN SIGNATURE: <text:s/><text:span text:style-name="T1"><text:s text:c="40"/></text:span><text:s text:c="2"/>DATE: <text:span text:style-name="T1"><text:s text:c="5"/>/ <text:s text:c="5"/>/ <text:s text:c="5"/></text:span></text:p>
      <text:p text:style-name="P7"/>
      <text:p text:style-name="P7"/>
      <text:p text:style-name="P6"/>
      <text:p text:style-name="P6"/>
      <text:p text:style-name="P6"/>
      <text:p text:style-name="P6">PAL OPTICAL</text:p>
      <text:p text:style-name="P6"/>
      <text:p text:style-name="P6">SEMI RIMLESS IN PLASTIC WAIVER</text:p>
      <text:p text:style-name="P1"/>
      <text:p text:style-name="P2"><text:tab/><text:span text:style-name="T3">I HAVE BEEN CAUTIONED THAT MY TYPE OF FRAME SHOULD HAVE POLYCARBONATE LENSES DUE TO IT BEING SEMI-RIMLESS. AS I AM FORGOING POLYCARBONATE FOR PLASTIC LENSES I WILL NOT HOLD PAL OPTICAL RESPONSIBLE FOR ANY CHIPPING OR BREAKING THE LENS MIGHT DUE IF DROPPED OR OTHERWISE DAMAGED BY MYSELF. I AM ALSO FORGOING ANY REMAKES OR FRAME RESTYLES UNLESS OTHERWISE DICTATED BY MY INSURANCE.</text:span></text:p>
      <text:p text:style-name="P3"/>
      <text:p text:style-name="P4"/>
      <text:p text:style-name="P5">PATIENTS SIGNATURE: <text:span text:style-name="T1"><text:s text:c="38"/></text:span><text:s text:c="5"/>DATE: <text:span text:style-name="T1"><text:s text:c="5"/>/ <text:s text:c="4"/>/ <text:s text:c="7"/></text:span></text:p>
      <text:p text:style-name="P5"/>
      <text:p text:style-name="P5">OPTICIAN SIGNATURE: <text:s/><text:span text:style-name="T1"><text:s text:c="40"/></text:span><text:s text:c="2"/>DATE: <text:span text:style-name="T1"><text:s text:c="5"/>/ <text:s text:c="5"/>/ <text:s text:c="5"/></text:span></text:p>
      <text:p text:style-name="P7"/>
      <text:p text:style-name="P7"/>
      <text:p text:style-name="P6"><text:soft-page-break/>PAL OPTICAL</text:p>
      <text:p text:style-name="P6"/>
      <text:p text:style-name="P14"><text:span text:style-name="T14">MONTURAS AL AIRE </text:span><text:span text:style-name="T16">DE PLÁSTICO </text:span><text:span text:style-name="T14">RENUNCIA</text:span></text:p>
      <text:p text:style-name="P1"/>
      <text:p text:style-name="P2"><text:tab/><text:span text:style-name="T3">ME HAN ADVERTIDO QUE MI TIPO DE MONTURA DEBE TENER LENTES DE POLICARBONATO DEBIDO A QUE ES MONTURAS AL AIRE. NO RESPONSABILIZARÉ A PAL OPTICAL POR CUALQUIER DESGASTADO O ROTURA DE LAS LENTES QUE PUEDAN DEBERSE SI SE CAEN O DAÑAN DE ALGUNA MANERA. ADEMÁS, RENUNCIO A CUALQUIER REHABILITACIÓN O REDISEÑO DE LA MONTURA, A MENOS QUE MI SEGURO INDIQUE LO CONTRARIO.</text:span></text:p>
      <text:p text:style-name="P3"/>
      <text:p text:style-name="P4"/>
      <text:p text:style-name="P5">FIRMA DEL PACIENTE: <text:span text:style-name="T1"><text:s text:c="44"/></text:span>FECHA: <text:span text:style-name="T1"><text:s text:c="5"/>/ <text:s text:c="4"/>/ <text:s text:c="7"/></text:span></text:p>
      <text:p text:style-name="P5"/>
      <text:p text:style-name="P7"><text:span text:style-name="T21">FIRMA DE ÓPTICOS</text:span>: <text:s text:c="47"/><text:span text:style-name="T21">FECHA</text:span>: <text:s text:c="5"/>/ <text:s text:c="5"/>/ <text:s text:c="4"/></text:p>
      <text:p text:style-name="P7"/>
      <text:p text:style-name="P6"/>
      <text:p text:style-name="P6"/>
      <text:p text:style-name="P6"/>
      <text:p text:style-name="P6">PAL OPTICAL</text:p>
      <text:p text:style-name="P6"/>
      <text:p text:style-name="P14"><text:span text:style-name="T14">MONTURAS AL AIRE </text:span><text:span text:style-name="T16">DE PLÁSTICO </text:span><text:span text:style-name="T14">RENUNCIA</text:span></text:p>
      <text:p text:style-name="P1"/>
      <text:p text:style-name="P2"><text:tab/><text:span text:style-name="T3">ME HAN ADVERTIDO QUE MI TIPO DE MONTURA DEBE TENER LENTES DE POLICARBONATO DEBIDO A QUE ES MONTURAS AL AIRE. NO RESPONSABILIZARÉ A PAL OPTICAL POR CUALQUIER DESGASTADO O ROTURA DE LAS LENTES QUE PUEDAN DEBERSE SI SE CAEN O DAÑAN DE ALGUNA MANERA. ADEMÁS, RENUNCIO A CUALQUIER REHABILITACIÓN O REDISEÑO DE LA MONTURA, A MENOS QUE MI SEGURO INDIQUE LO CONTRARIO.</text:span></text:p>
      <text:p text:style-name="P3"/>
      <text:p text:style-name="P4"/>
      <text:p text:style-name="P5">FIRMA DEL PACIENTE: <text:span text:style-name="T1"><text:s text:c="44"/></text:span>FECHA: <text:span text:style-name="T1"><text:s text:c="5"/>/ <text:s text:c="4"/>/ <text:s text:c="7"/></text:span></text:p>
      <text:p text:style-name="P5"/>
      <text:p text:style-name="P7"><text:span text:style-name="T21">FIRMA DE ÓPTICOS</text:span>: <text:s text:c="47"/><text:span text:style-name="T21">FECHA</text:span>: <text:s text:c="5"/>/ <text:s text:c="5"/>/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apple-system" svg:font-family="apple-system, BlinkMacSystemFont, 'Segoe UI', Roboto, 'Helvetica Neue', Arial, 'Apple Color Emoji', 'Segoe UI Emoji', 'Segoe UI Symbol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L OPTICAL</meta:initial-creator>
    <meta:creation-date>2025-05-01T11:19:29.53</meta:creation-date>
    <dc:date>2025-07-22T12:48:33.73</dc:date>
    <dc:creator>PAL OPTICAL</dc:creator>
    <meta:editing-duration>PT16M55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2" meta:paragraph-count="20" meta:word-count="326" meta:character-count="2376"/>
  </office:meta>
</office:document-meta>
</file>