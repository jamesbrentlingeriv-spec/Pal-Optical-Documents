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000000145FF2B9AA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w Cen MT" fo:font-size="16pt" style:text-underline-style="none" fo:font-weight="bold" officeooo:rsid="00158914" officeooo:paragraph-rsid="00158914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style:font-name="Tw Cen MT" fo:font-size="16pt" style:text-underline-style="none" fo:font-weight="bold" style:font-size-asian="16pt" style:font-size-complex="16pt"/>
    </style:style>
    <style:style style:name="P3" style:family="paragraph" style:parent-style-name="Text_20_body">
      <style:paragraph-properties fo:text-align="center" style:justify-single-word="false"/>
      <style:text-properties style:font-name="Tw Cen MT" fo:font-size="16pt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style:font-name="Tw Cen MT" fo:font-size="16pt" officeooo:rsid="00158914" officeooo:paragraph-rsid="00158914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w Cen MT" fo:font-size="16pt" officeooo:paragraph-rsid="00158914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officeooo:rsid="00158914"/>
    </style:style>
    <style:style style:name="T3" style:family="text">
      <style:text-properties fo:font-weight="bold" officeooo:rsid="00158914" style:font-weight-asian="bold" style:font-weight-complex="bold"/>
    </style:style>
    <style:style style:name="T4" style:family="text">
      <style:text-properties fo:font-size="10pt" officeooo:rsid="00158914" style:font-size-asian="8.75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.0846in, 0.1945in, 0.30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 OPTICAL</text:p>
      <text:p text:style-name="P1">1555 E NEW CIRCLE RD SUITE 146</text:p>
      <text:p text:style-name="P1">LEXINGTON, KY 40509</text:p>
      <text:p text:style-name="P1"/>
      <text:p text:style-name="P2">VERIFICATION OF APPOINTMENT</text:p>
      <text:p text:style-name="P2"/>
      <text:p text:style-name="P3"><text:s/><text:span text:style-name="T1">Patient Name:</text:span> <text:span text:style-name="T2">____________________________</text:span><text:span text:style-name="T3">Date:____/____/_______</text:span></text:p>
      <text:p text:style-name="P3">Please excuse the patient named above from work/school. They were present in our office on this date for the following service:</text:p>
      <text:p text:style-name="P3">[ ] Comprehensive Eye Examination [ ] Eyeglass Repair / Adjustment <text:s text:c="14"/>[ ] Dispensing of Eyewear [ ] Follow-up Consultation</text:p>
      <text:p text:style-name="P3"><text:span text:style-name="T1">Time In:</text:span> ____:_<text:span text:style-name="T2">_</text:span>__<text:span text:style-name="T4">AM/PM</text:span> <text:span text:style-name="T1">Time Out:</text:span> __<text:span text:style-name="T2">_</text:span>_:_<text:span text:style-name="T2">_</text:span>__<text:span text:style-name="T4">AM/PM</text:span></text:p>
      <text:p text:style-name="P4"><draw:frame draw:style-name="fr1" draw:name="Image1" text:anchor-type="char" svg:x="3.0193in" svg:y="0.0984in" svg:width="2.802in" svg:height="0.4646in" draw:z-index="0"><draw:image xlink:href="Pictures/100000000000034000000145FF2B9AAF.png" xlink:type="simple" xlink:show="embed" xlink:actuate="onLoad" draw:mime-type="image/png"/></draw:frame></text:p>
      <text:p text:style-name="P3"><text:span text:style-name="T1">Authorized Signature:</text:span> __________________________ 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AL OPTICAL</meta:initial-creator>
    <meta:creation-date>2023-11-29T10:21:10.83</meta:creation-date>
    <meta:print-date>2025-09-24T09:14:58.673515900</meta:print-date>
    <dc:date>2026-06-20T12:29:04.192252600</dc:date>
    <meta:editing-duration>PT3H32M22S</meta:editing-duration>
    <meta:editing-cycles>7</meta:editing-cycles>
    <meta:generator>LibreOffice/25.8.7.3$Windows_X86_64 LibreOffice_project/30742500f2d3eb4366ac312fa33d3dcabdb3eba5</meta:generator>
    <meta:document-statistic meta:table-count="0" meta:image-count="1" meta:object-count="0" meta:page-count="1" meta:paragraph-count="9" meta:word-count="68" meta:character-count="509" meta:non-whitespace-character-count="434"/>
  </office:meta>
</office:document-meta>
</file>