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0F0000013F8E556C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Google Sans Text" svg:font-family="'Google Sans Text', sans-serif"/>
    <style:font-face style:name="OpenSymbol1" svg:font-family="OpenSymbol"/>
    <style:font-face style:name="Segoe UI" svg:font-family="'Segoe U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loext:contextual-spacing="false" fo:margin-top="0in" fo:margin-bottom="0.0972in" fo:line-height="114%" fo:padding="0in" fo:border="none"/>
      <style:text-properties style:font-name="Google Sans Text" fo:font-size="12pt" style:font-size-asian="12pt" style:font-size-complex="12pt"/>
    </style:style>
    <style:style style:name="P2" style:family="paragraph" style:parent-style-name="Text_20_body">
      <style:paragraph-properties loext:contextual-spacing="false" fo:margin-top="0in" fo:margin-bottom="0.0972in" fo:line-height="114%"/>
      <style:text-properties style:font-name="Google Sans Text" fo:font-size="12pt" style:font-size-asian="12pt" style:font-size-complex="12pt"/>
    </style:style>
    <style:style style:name="P3" style:family="paragraph" style:parent-style-name="Text_20_body">
      <style:paragraph-properties loext:contextual-spacing="false" fo:margin-top="0in" fo:margin-bottom="0.0972in" fo:line-height="114%"/>
      <style:text-properties style:font-name="Google Sans Text" fo:font-size="12pt" style:font-size-asian="12pt" style:font-size-complex="12pt"/>
    </style:style>
    <style:style style:name="P4" style:family="paragraph" style:parent-style-name="Text_20_body">
      <style:paragraph-properties loext:contextual-spacing="false" fo:margin-top="0in" fo:margin-bottom="0.0972in" fo:line-height="114%"/>
      <style:text-properties style:font-name="Google Sans Text" fo:font-size="12pt" fo:font-weight="bold"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Heading_20_3">
      <style:paragraph-properties fo:text-align="center" style:justify-single-word="false"/>
      <style:text-properties style:font-name="Google Sans Text" fo:font-size="15pt" fo:font-weight="bold" style:font-size-asian="15pt" style:font-size-complex="15pt"/>
    </style:style>
    <style:style style:name="T1" style:family="text">
      <style:text-properties fo:font-weight="bold"/>
    </style:style>
    <style:style style:name="T2" style:family="text">
      <style:text-properties style:font-name="Segoe UI"/>
    </style:style>
    <style:style style:name="T3" style:family="text">
      <style:text-properties style:font-name="Google Sans Tex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KENTUCKY MEDICAID / AVESIS STATEMENT OF NECESSITY</text:h>
      <text:p text:style-name="P2"><text:span text:style-name="T1">Member Name:</text:span> __________________________________________<text:span text:style-name="T1">DOB:</text:span> ______________ </text:p>
      <text:p text:style-name="P2"><text:span text:style-name="T1">ID #:</text:span> _________________________________________<text:span text:style-name="T1">Date of Service:</text:span> _______________</text:p>
      <text:p text:style-name="P4">Clinical Justification (Check all that apply):</text:p>
      <text:list xml:id="list407586265299926668" text:style-name="L1">
        <text:list-item>
          <text:p text:style-name="P1">[ ] <text:span text:style-name="T1">Significant Refractive Change:</text:span> Patient has experienced a change in vision of ±0.50D or greater in sphere/cylinder or a change in axis of <text:s/>&gt;15<text:span text:style-name="T2">º</text:span>.</text:p>
        </text:list-item>
        <text:list-item>
          <text:p text:style-name="P1">[ ] <text:span text:style-name="T1">Functional Impairment:</text:span> Current eyewear is non-functional due to [ ] Breakage [ ] Severe Scratches [ ] Lost, and is unrepairable.</text:p>
        </text:list-item>
        <text:list-item>
          <text:p text:style-name="P1">[ ] <text:span text:style-name="T1">Pathological Change:</text:span> Change in vision due to [ ] Cataracts [ ] Diabetes </text:p>
          <text:p text:style-name="P1">[ ] Other: __________</text:p>
        </text:list-item>
      </text:list>
      <text:p text:style-name="P4">Provider Statement:</text:p>
      <text:p text:style-name="P2">I certify that the replacement of this member’s eyewear is medically necessary to restore the patient's visual acuity to the highest functional level and to ensure safety in daily living activities (e.g., driving, ambulation, employment).</text:p>
      <text:p text:style-name="P4">Member Acknowledgment:</text:p>
      <text:p text:style-name="P2">I certify that I have not received a pair of eyeglasses through Medicaid within the current benefit period, or my current glasses are lost/broken/unusable.</text:p>
      <text:p text:style-name="P2"><draw:frame draw:style-name="fr1" draw:name="graphics1" text:anchor-type="paragraph" svg:x="1.8in" svg:y="-0.0374in" svg:width="2.9591in" svg:height="0.6709in" draw:z-index="0"><draw:image xlink:href="Pictures/100002010000030F0000013F8E556C93.png" xlink:type="simple" xlink:show="embed" xlink:actuate="onLoad"/></draw:frame></text:p>
      <text:p text:style-name="P2"><text:span text:style-name="T1">Provider Signature/Title:</text:span> ___________________________ <text:span text:style-name="T1">Date:</text:span> _________</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Google Sans Text" svg:font-family="'Google Sans Text', sans-serif"/>
    <style:font-face style:name="OpenSymbol1" svg:font-family="OpenSymbol"/>
    <style:font-face style:name="Segoe UI" svg:font-family="'Segoe U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paragraph-properties loext:contextual-spacing="false" fo:margin-top="0.0972in" fo:margin-bottom="0.0835in"/>
      <style:text-properties style:font-name="Liberation Serif" fo:font-size="14pt" fo:font-weight="bold" style:font-name-asian="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6-03T17:11:14.36</meta:creation-date>
    <meta:print-date>2026-06-03T17:16:00.90</meta:print-date>
    <meta:document-statistic meta:table-count="0" meta:image-count="1" meta:object-count="0" meta:page-count="1" meta:paragraph-count="13" meta:word-count="162" meta:character-count="1132"/>
    <dc:date>2026-06-03T17:16:28.70</dc:date>
    <meta:editing-duration>PT5M15S</meta:editing-duration>
    <meta:editing-cycles>1</meta:editing-cycles>
    <meta:generator>OpenOffice/4.1.15$Win32 OpenOffice.org_project/4115m2$Build-9813</meta:generator>
  </office:meta>
</office:document-meta>
</file>