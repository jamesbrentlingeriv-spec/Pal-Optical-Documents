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w Cen MT" fo:font-size="20pt" style:text-underline-style="solid" style:text-underline-width="auto" style:text-underline-color="font-color" fo:font-weight="bold" officeooo:paragraph-rsid="00156158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Tw Cen MT" fo:font-size="14pt" style:text-underline-style="none" fo:font-weight="bold" officeooo:paragraph-rsid="00156158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w Cen M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w Cen MT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Tw Cen MT" fo:font-size="14pt" style:text-underline-style="solid" style:text-underline-width="auto" style:text-underline-color="font-color" fo:font-weight="bold" officeooo:paragraph-rsid="00156158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w Cen MT" fo:font-size="20pt" style:text-underline-style="solid" style:text-underline-width="auto" style:text-underline-color="font-color" fo:font-weight="bold" officeooo:paragraph-rsid="00170cbf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w Cen MT" fo:font-size="14pt" style:text-underline-style="none" fo:font-weight="bold" officeooo:paragraph-rsid="00170cbf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w Cen MT"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w Cen MT" fo:font-size="14pt" style:text-underline-style="solid" style:text-underline-width="auto" style:text-underline-color="font-color" fo:font-weight="bold" officeooo:paragraph-rsid="00170cbf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w Cen MT" fo:font-size="14pt" fo:font-weight="bold" officeooo:paragraph-rsid="00170cb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w Cen M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officeooo:rsid="00156158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officeooo:rsid="00170cbf"/>
    </style:style>
    <style:style style:name="T4" style:family="text">
      <style:text-properties fo:font-style="italic"/>
    </style:style>
    <style:style style:name="T5" style:family="text">
      <style:text-properties fo:font-style="italic" officeooo:rsid="00170c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 OPTICAL </text:p>
      <text:p text:style-name="P2">1555 E New Circle Rd Lexington, KY 40509</text:p>
      <text:p text:style-name="P3"/>
      <text:p text:style-name="P3">FRAME SELECTION <text:span text:style-name="T1">W/O CHILD PRESENT</text:span> WAIVER</text:p>
      <text:p text:style-name="P4">At Pal Optical, we highly recommend that children try on frames to ensure the best possible comfort and vision correction. By choosing a frame without your child present, you accept full responsibility for the final fit and style.</text:p>
      <text:p text:style-name="P4"><text:span text:style-name="T2">Policy Agreement:</text:span> I understand that if the selected frame does not fit or is not preferred by the child, Pal Optical <text:span text:style-name="T2">cannot offer a free exchange or lens remake.</text:span> Any changes to the frame or lenses after fabrication will be at the customer's full expense.</text:p>
      <text:p text:style-name="P4"/>
      <text:p text:style-name="P4">Customer Signature: <text:span text:style-name="T1">________________________________</text:span> <text:s text:c="3"/>Date: <text:span text:style-name="T1">____/___/______</text:span></text:p>
      <text:p text:style-name="P4"/>
      <text:p text:style-name="P5"/>
      <text:p text:style-name="P5"/>
      <text:p text:style-name="P5"/>
      <text:p text:style-name="P1">PAL OPTICAL </text:p>
      <text:p text:style-name="P2">1555 E New Circle Rd Lexington, KY 40509</text:p>
      <text:p text:style-name="P5"/>
      <text:p text:style-name="P5">FRAME SELECTION <text:span text:style-name="T1">W/O CHILD PRESENT</text:span> WAIVER</text:p>
      <text:p text:style-name="P2">At Pal Optical, we highly recommend that children try on frames to ensure the best possible comfort and vision correction. By choosing a frame without your child present, you accept full responsibility for the final fit and style.</text:p>
      <text:p text:style-name="P2"><text:span text:style-name="T2">Policy Agreement:</text:span> I understand that if the selected frame does not fit or is not preferred by the child, Pal Optical <text:span text:style-name="T2">cannot offer a free exchange or lens remake.</text:span> Any changes to the frame or lenses after fabrication will be at the customer's full expense.</text:p>
      <text:p text:style-name="P2"/>
      <text:p text:style-name="P2">Customer Signature: <text:span text:style-name="T1">________________________________</text:span> <text:s text:c="3"/>Date: <text:span text:style-name="T1">____/___/______</text:span></text:p>
      <text:p text:style-name="P2"/>
      <text:p text:style-name="P2"/>
      <text:p text:style-name="P2"/>
      <text:p text:style-name="P6"><text:soft-page-break/>PAL OPTICAL </text:p>
      <text:p text:style-name="P7">1555 E New Circle Rd Lexington, KY 40509</text:p>
      <text:p text:style-name="P3">RENUNCIA DE RESPONSABILIDAD: SELECCIÓN DE ARMAZÓN SIN EL NIÑO PRESENTE</text:p>
      <text:p text:style-name="P8">En Pal Optical, recomendamos encarecidamente que los niños se prueben los armazones para garantizar la mayor comodidad y corrección visual posible. Al elegir un armazón sin que el niño esté presente, usted acepta la total responsabilidad por el ajuste final y el estilo.</text:p>
      <text:p text:style-name="P8"><text:span text:style-name="T2">Aceptación de la Política</text:span>: Entiendo que si el armazón seleccionado no ajusta bien o no es del agrado del niño, Pal Optical <text:span text:style-name="T2">no puede ofrecer cambios gratuitos ni volver a fabricar los lentes sin costo</text:span>. Cualquier cambio en el armazón o en los lentes después de su fabricación correrá por cuenta y cargo total del cliente.</text:p>
      <text:p text:style-name="P8"/>
      <text:p text:style-name="P8">Firma del Cliente: ___________________________Fecha: <text:span text:style-name="T3">____</text:span><text:span text:style-name="T4">/</text:span><text:span text:style-name="T5">____</text:span><text:span text:style-name="T4">/</text:span>____<text:span text:style-name="T3">__</text:span>_</text:p>
      <text:p text:style-name="P8"/>
      <text:p text:style-name="P8"/>
      <text:p text:style-name="P8"/>
      <text:p text:style-name="P6">PAL OPTICAL </text:p>
      <text:p text:style-name="P7">1555 E New Circle Rd Lexington, KY 40509</text:p>
      <text:p text:style-name="P9">RENUNCIA DE RESPONSABILIDAD: SELECCIÓN DE ARMAZÓN SIN EL NIÑO PRESENTE</text:p>
      <text:p text:style-name="P10">En Pal Optical, recomendamos encarecidamente que los niños se prueben los armazones para garantizar la mayor comodidad y corrección visual posible. Al elegir un armazón sin que el niño esté presente, usted acepta la total responsabilidad por el ajuste final y el estilo.</text:p>
      <text:p text:style-name="P10"><text:span text:style-name="T2">Aceptación de la Política</text:span>: Entiendo que si el armazón seleccionado no ajusta bien o no es del agrado del niño, Pal Optical <text:span text:style-name="T2">no puede ofrecer cambios gratuitos ni volver a fabricar los lentes sin costo</text:span>. Cualquier cambio en el armazón o en los lentes después de su fabricación correrá por cuenta y cargo total del cliente.</text:p>
      <text:p text:style-name="P10"/>
      <text:p text:style-name="P10">Firma del Cliente: ___________________________Fecha: <text:span text:style-name="T3">____</text:span><text:span text:style-name="T4">/</text:span><text:span text:style-name="T5">____</text:span><text:span text:style-name="T4">/</text:span>____<text:span text:style-name="T3">__</text:span>_</text:p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AL OPTICAL</meta:initial-creator>
    <meta:creation-date>2023-11-29T09:56:47.09</meta:creation-date>
    <meta:print-date>2026-01-27T16:09:08.900511900</meta:print-date>
    <dc:date>2026-01-27T16:09:12.231907800</dc:date>
    <meta:editing-duration>PT17M27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24" meta:word-count="456" meta:character-count="2868" meta:non-whitespace-character-count="2426"/>
  </office:meta>
</office:document-meta>
</file>