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30000005DA6F86DE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w Cen MT" svg:font-family="'Tw Cen MT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w Cen MT" style:text-underline-style="solid" style:text-underline-width="auto" style:text-underline-color="font-color" fo:font-weight="bold" officeooo:rsid="000d28ad" officeooo:paragraph-rsid="000d28a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w Cen MT" style:text-underline-style="none" fo:font-weight="bold" officeooo:rsid="000d28ad" officeooo:paragraph-rsid="000d28a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w Cen MT" style:text-underline-style="solid" style:text-underline-width="auto" style:text-underline-color="font-color" fo:font-weight="bold" officeooo:rsid="000d28ad" officeooo:paragraph-rsid="000dd3f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w Cen MT" style:text-underline-style="none" fo:font-weight="bold" officeooo:rsid="000d28ad" officeooo:paragraph-rsid="000dd3f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w Cen MT" style:text-underline-style="solid" style:text-underline-width="auto" style:text-underline-color="font-color" fo:font-weight="bold" officeooo:rsid="000dd3fa" officeooo:paragraph-rsid="000dd3f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w Cen MT" style:text-underline-style="none" fo:font-weight="bold" officeooo:rsid="000dd3fa" officeooo:paragraph-rsid="000dd3fa" style:font-weight-asian="bold" style:font-weight-complex="bold"/>
    </style:style>
    <style:style style:name="P7" style:family="paragraph" style:parent-style-name="Standard">
      <style:paragraph-properties fo:margin-left="0in" fo:line-height="115%" fo:text-indent="0in" style:auto-text-indent="false"/>
      <style:text-properties style:font-name="Tw Cen MT" fo:font-size="12pt" style:text-underline-style="none" fo:font-weight="bold" officeooo:rsid="0006739d" officeooo:paragraph-rsid="000dd3fa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in" fo:line-height="115%" fo:text-indent="0in" style:auto-text-indent="false"/>
      <style:text-properties style:font-name="Tw Cen MT" fo:font-size="12pt" style:text-underline-style="none" fo:font-weight="bold" officeooo:rsid="000dd3fa" officeooo:paragraph-rsid="000dd3fa" style:font-size-asian="12pt" style:font-weight-asian="bold" style:font-size-complex="12pt" style:font-weight-complex="bold"/>
    </style:style>
    <style:style style:name="T1" style:family="text">
      <style:text-properties fo:font-family="'Tw Cen MT'"/>
    </style:style>
    <style:style style:name="T2" style:family="text">
      <style:text-properties officeooo:rsid="000dd3fa"/>
    </style:style>
    <style:style style:name="T3" style:family="text">
      <style:text-properties style:text-underline-style="none"/>
    </style:style>
    <style:style style:name="T4" style:family="text">
      <style:text-properties fo:font-family="'Tw Cen MT'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3.1717in" svg:y="-0.3854in" svg:width="1.0528in" svg:height="0.3756in" draw:z-index="0"><draw:image xlink:href="Pictures/10000001000001130000005DA6F86DE5.png" xlink:type="simple" xlink:show="embed" xlink:actuate="onLoad" draw:mime-type="image/png"/></draw:frame>PATIENT INFORMATION SHEET</text:p>
      <text:p text:style-name="P2"/>
      <text:p text:style-name="P2">PATIENT’S NAME:____________________________________________________________________</text:p>
      <text:p text:style-name="P2"/>
      <text:p text:style-name="P2">ADDRESS:___________________________CITY:__________________STATE:_____ZIP:___________</text:p>
      <text:p text:style-name="P2"/>
      <text:p text:style-name="P2">SOCIAL SECURITY #:___________________________DATE OF BIRTH:______/______/___________</text:p>
      <text:p text:style-name="P2"/>
      <text:p text:style-name="P2">PHONE #:___________________________________EMAIL:_________________________________</text:p>
      <text:p text:style-name="P2"/>
      <text:p text:style-name="P2">GENDER:_________________________________RACE: <text:s/><text:span text:style-name="T1">O</text:span> WHITE <text:s/><text:span text:style-name="T1">O</text:span> BLACK <text:s/><text:span text:style-name="T1">O</text:span> HISPANIC <text:s/><text:span text:style-name="T1">O</text:span> ASIAN</text:p>
      <text:p text:style-name="P2"/>
      <text:p text:style-name="P2">ETHNICITY: <text:span text:style-name="T1">O</text:span> HISPANIC <text:s/><text:span text:style-name="T1">O</text:span> PACIFIC ISLANDER <text:s/><text:span text:style-name="T1">O</text:span> AMERICAN INDIAN <text:s/><text:span text:style-name="T1">O</text:span> NON-HISPANIC</text:p>
      <text:p text:style-name="P2"/>
      <text:p text:style-name="P2">PREFERRED METHOD OF COMMUNICATION:<text:tab/><text:tab/><text:span text:style-name="T1">O</text:span> PHONE <text:s/><text:span text:style-name="T1">O</text:span> EMAIL <text:s/><text:span text:style-name="T1">O</text:span> MAIL</text:p>
      <text:p text:style-name="P2"/>
      <text:p text:style-name="P2">PREFERRED LANGUAGE:______________________<text:span text:style-name="T2">________________________________________</text:span></text:p>
      <text:p text:style-name="P2"/>
      <text:p text:style-name="P1">PRIMARY INSURANCE INFORMATION</text:p>
      <text:p text:style-name="P1"/>
      <text:p text:style-name="P2">INSURANCE NAME:________________________CARDHOLDER NAME:________________________</text:p>
      <text:p text:style-name="P2"/>
      <text:p text:style-name="P2">INSURANCE ID #:__________________________CARDHOLDER D.O.B.:______/_______/_________</text:p>
      <text:p text:style-name="P2"/>
      <text:p text:style-name="P2">RELATIONSHIP TO PATIENT:___________________<text:span text:style-name="T2">POLICYHOLDER/EMPLOYER:_________________</text:span></text:p>
      <text:p text:style-name="P2"/>
      <text:p text:style-name="P3"><draw:frame draw:style-name="fr1" draw:name="Image2" text:anchor-type="char" svg:x="3.1398in" svg:y="0.1425in" svg:width="1.1161in" svg:height="0.378in" draw:z-index="1"><draw:image xlink:href="Pictures/10000001000001130000005DA6F86DE5.png" xlink:type="simple" xlink:show="embed" xlink:actuate="onLoad" draw:mime-type="image/png"/></draw:frame></text:p>
      <text:p text:style-name="P3"/>
      <text:p text:style-name="P3"/>
      <text:p text:style-name="P3">PATIENT INFORMATION SHEET</text:p>
      <text:p text:style-name="P4"/>
      <text:p text:style-name="P4">PATIENT’S NAME:____________________________________________________________________</text:p>
      <text:p text:style-name="P4"/>
      <text:p text:style-name="P4">ADDRESS:___________________________CITY:__________________STATE:_____ZIP:___________</text:p>
      <text:p text:style-name="P4"/>
      <text:p text:style-name="P4">SOCIAL SECURITY #:___________________________DATE OF BIRTH:______/______/___________</text:p>
      <text:p text:style-name="P4"/>
      <text:p text:style-name="P4">PHONE #:___________________________________EMAIL:_________________________________</text:p>
      <text:p text:style-name="P4"/>
      <text:p text:style-name="P4">GENDER:_________________________________RACE: <text:s/><text:span text:style-name="T1">O</text:span> WHITE <text:s/><text:span text:style-name="T1">O</text:span> BLACK <text:s/><text:span text:style-name="T1">O</text:span> HISPANIC <text:s/><text:span text:style-name="T1">O</text:span> ASIAN</text:p>
      <text:p text:style-name="P4"/>
      <text:p text:style-name="P4">ETHNICITY: <text:span text:style-name="T1">O</text:span> HISPANIC <text:s/><text:span text:style-name="T1">O</text:span> PACIFIC ISLANDER <text:s/><text:span text:style-name="T1">O</text:span> AMERICAN INDIAN <text:s/><text:span text:style-name="T1">O</text:span> NON-HISPANIC</text:p>
      <text:p text:style-name="P4"/>
      <text:p text:style-name="P4">PREFERRED METHOD OF COMMUNICATION:<text:tab/><text:tab/><text:span text:style-name="T1">O</text:span> PHONE <text:s/><text:span text:style-name="T1">O</text:span> EMAIL <text:s/><text:span text:style-name="T1">O</text:span> MAIL</text:p>
      <text:p text:style-name="P4"/>
      <text:p text:style-name="P4">PREFERRED LANGUAGE:_____________________<text:span text:style-name="T2">________________________________________</text:span>_</text:p>
      <text:p text:style-name="P4"/>
      <text:p text:style-name="P3">PRIMARY INSURANCE INFORMATION</text:p>
      <text:p text:style-name="P3"/>
      <text:p text:style-name="P4">INSURANCE NAME:________________________CARDHOLDER NAME:________________________</text:p>
      <text:p text:style-name="P4"/>
      <text:p text:style-name="P4">INSURANCE ID #:__________________________CARDHOLDER D.O.B.:______/_______/_________</text:p>
      <text:p text:style-name="P4"/>
      <text:p text:style-name="P4">RELATIONSHIP TO PATIENT:___________________<text:span text:style-name="T2">POLICYHOLDER/EMPLOYER:________________</text:span></text:p>
      <text:p text:style-name="P5"/>
      <text:p text:style-name="P5"><text:soft-page-break/>HAVE YOU HAD CATARACT SURGERY?<text:span text:style-name="T3"><text:tab/></text:span><text:span text:style-name="T4">O</text:span><text:span text:style-name="T3"> YES <text:s/></text:span><text:span text:style-name="T4">O</text:span><text:span text:style-name="T3"> NO <text:s text:c="4"/>DATE OF RIGHT EYE:________________</text:span></text:p>
      <text:p text:style-name="P6"/>
      <text:p text:style-name="P6">SURGEON’S NAME:_______________________________ <text:s text:c="2"/>DATE OF LEFT EYE:__________________</text:p>
      <text:p text:style-name="P6">SURGEON’S CITY:___________________________________STATE:___________________________</text:p>
      <text:p text:style-name="P6"/>
      <text:p text:style-name="P6"/>
      <text:p text:style-name="P6">DO YOU GIVE CONSENT TO RECEIVE A REMINDER CALL FOR YOUR NEXT EXAM?: <text:span text:style-name="T1">O</text:span> YES <text:s/><text:span text:style-name="T1">O</text:span> NO</text:p>
      <text:p text:style-name="P6"/>
      <text:p text:style-name="P6"/>
      <text:p text:style-name="P5">PARENT/GUARDIAN INFORMATION IF PATIENT IS UNDER 18<text:span text:style-name="T3">: </text:span></text:p>
      <text:p text:style-name="P6">NAME:_______________________________ ADDRESS:_____________________________________</text:p>
      <text:p text:style-name="P6">CITY:_________________________________STATE:__________ZIP:___________________________</text:p>
      <text:p text:style-name="P6">SOCIAL SECURITY #:_________________________________DATE OF BIRTH:___________________</text:p>
      <text:p text:style-name="P6"/>
      <text:p text:style-name="P7">PLEASE NOTE THE AMOUNT YOU INSURANCE HAS QUOTED IS AN ESTIMATE. THIS IS NOT A GUARANTEE OF PAYMENT INSURNACE COMPANIES WILL DETERMINE THE EXACT AMOUNT WHEN CLAIM IS PROCESSED. IF IT IS DIFFERENT FROM TODAYS QUOTE WE WILL SEND YOU A BILL OR REFUND THE DIFFERENCE.</text:p>
      <text:p text:style-name="P7"/>
      <text:p text:style-name="P7">I AUTHORIZE THE RELEASE OF ANY AND ALL INFORMATION TO ANY NECESSARY PARTIES FOR INSURANCE CLAIMS OR THE COLLECTION OF ANY FEES.</text:p>
      <text:p text:style-name="P7"/>
      <text:p text:style-name="P8">SIGNATURE:_______________________________________DATE:____________________________</text:p>
      <text:p text:style-name="P8"/>
      <text:p text:style-name="P8"/>
      <text:p text:style-name="P5"/>
      <text:p text:style-name="P5"/>
      <text:p text:style-name="P5"/>
      <text:p text:style-name="P5"/>
      <text:p text:style-name="P5">HAVE YOU HAD CATARACT SURGERY?<text:span text:style-name="T3"><text:tab/></text:span><text:span text:style-name="T4">O</text:span><text:span text:style-name="T3"> YES <text:s/></text:span><text:span text:style-name="T4">O</text:span><text:span text:style-name="T3"> NO <text:s text:c="4"/>DATE OF RIGHT EYE:________________</text:span></text:p>
      <text:p text:style-name="P6"/>
      <text:p text:style-name="P6">SURGEON’S NAME:_______________________________ <text:s text:c="2"/>DATE OF LEFT EYE:__________________</text:p>
      <text:p text:style-name="P6">SURGEON’S CITY:___________________________________STATE:___________________________</text:p>
      <text:p text:style-name="P6"/>
      <text:p text:style-name="P6"/>
      <text:p text:style-name="P6">DO YOU GIVE CONSENT TO RECEIVE A REMINDER CALL FOR YOUR NEXT EXAM?: <text:span text:style-name="T1">O</text:span> YES <text:s/><text:span text:style-name="T1">O</text:span> NO</text:p>
      <text:p text:style-name="P6"/>
      <text:p text:style-name="P6"/>
      <text:p text:style-name="P5">PARENT/GUARDIAN INFORMATION IF PATIENT IS UNDER 18<text:span text:style-name="T3">: </text:span></text:p>
      <text:p text:style-name="P6">NAME:_______________________________ ADDRESS:_____________________________________</text:p>
      <text:p text:style-name="P6">CITY:_________________________________STATE:__________ZIP:___________________________</text:p>
      <text:p text:style-name="P6">SOCIAL SECURITY #:_________________________________DATE OF BIRTH:___________________</text:p>
      <text:p text:style-name="P6"/>
      <text:p text:style-name="P7">PLEASE NOTE THE AMOUNT YOU INSURANCE HAS QUOTED IS AN ESTIMATE. THIS IS NOT A GUARANTEE OF PAYMENT INSURNACE COMPANIES WILL DETERMINE THE EXACT AMOUNT WHEN CLAIM IS PROCESSED. IF IT IS DIFFERENT FROM TODAYS QUOTE WE WILL SEND YOU A BILL OR REFUND THE DIFFERENCE.</text:p>
      <text:p text:style-name="P7"/>
      <text:p text:style-name="P7">I AUTHORIZE THE RELEASE OF ANY AND ALL INFORMATION TO ANY NECESSARY PARTIES FOR INSURANCE CLAIMS OR THE COLLECTION OF ANY FEES.</text:p>
      <text:p text:style-name="P7"/>
      <text:p text:style-name="P8">SIGNATURE:_______________________________________DATE:____________________________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w Cen MT" svg:font-family="'Tw Cen MT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6T12:04:17.433821600</meta:creation-date>
    <meta:print-date>2025-07-31T12:24:23.394311500</meta:print-date>
    <dc:date>2025-07-31T12:25:30.842400100</dc:date>
    <meta:editing-duration>PT17M39S</meta:editing-duration>
    <meta:editing-cycles>3</meta:editing-cycles>
    <meta:generator>LibreOffice/25.2.4.3$Windows_X86_64 LibreOffice_project/33e196637044ead23f5c3226cde09b47731f7e27</meta:generator>
    <meta:document-statistic meta:table-count="0" meta:image-count="2" meta:object-count="0" meta:page-count="2" meta:paragraph-count="48" meta:word-count="360" meta:character-count="4065" meta:non-whitespace-character-count="3715"/>
  </office:meta>
</office:document-meta>
</file>