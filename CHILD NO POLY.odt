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ef" svg:font-family="Alef" style:font-adornments="Bold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w Cen MT Condensed Extra Bold" svg:font-family="'Tw Cen MT Condensed Extra Bold'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style:font-name="Alef" fo:font-size="14pt" fo:font-weight="bold" style:font-size-asian="14pt" style:font-size-complex="14pt"/>
    </style:style>
    <style:style style:name="P2" style:family="paragraph" style:parent-style-name="Text_20_body">
      <style:paragraph-properties fo:line-height="100%" fo:text-align="center" style:justify-single-word="false"/>
      <style:text-properties style:font-name="Alef" fo:font-size="14pt" style:font-size-asian="14pt" style:font-size-complex="14pt"/>
    </style:style>
    <style:style style:name="P3" style:family="paragraph" style:parent-style-name="Text_20_body">
      <style:paragraph-properties fo:line-height="100%" fo:text-align="center" style:justify-single-word="false"/>
      <style:text-properties style:font-name="Alef" fo:font-size="14pt" officeooo:paragraph-rsid="001468a5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Alef" fo:font-size="13pt" fo:font-weight="bold" style:font-size-asian="13pt" style:font-size-complex="13pt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Alef" fo:font-size="13pt" officeooo:paragraph-rsid="001468a5" style:font-size-asian="13pt" style:font-size-complex="13pt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Alef" fo:font-size="13pt" style:font-size-asian="13pt" style:font-size-complex="13pt"/>
    </style:style>
    <style:style style:name="P7" style:family="paragraph" style:parent-style-name="Text_20_body">
      <style:paragraph-properties fo:line-height="100%" fo:text-align="center" style:justify-single-word="false"/>
      <style:text-properties style:font-name="Alef" fo:font-size="13pt" fo:font-weight="bold" officeooo:paragraph-rsid="001468a5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TY TO WARN &amp; INFORMED REFUSAL OF POLYCARBONATE LENSES</text:p>
      <text:p text:style-name="P2"><text:span text:style-name="T1">Patient Name:</text:span> __________________________ <text:span text:style-name="T1">DOB:</text:span> ___/___/____ <text:span text:style-name="T1">Date:</text:span> ___/___/____</text:p>
      <text:p text:style-name="P2"><text:span text:style-name="T1">Parent/Guardian Name:</text:span> ________________________________</text:p>
      <text:p text:style-name="P2"><text:span text:style-name="T1">Professional Recommendation</text:span> This office recommends, in accordance with national safety standards, that all patients under the age of 18 be fitted with <text:span text:style-name="T1">polycarbonate</text:span> or <text:span text:style-name="T1">Trivex</text:span> lenses. These materials are impact-resistant and provide the highest level of eye protection. Standard plastic (CR-39) and glass lenses are <text:span text:style-name="T1">not</text:span> impact-resistant and may shatter into sharp shards upon impact, causing serious injury or blindness.</text:p>
      <text:p text:style-name="P2"><text:span text:style-name="T1">Waiver and Release</text:span> I acknowledge that I have been informed of the recommendation to purchase impact-resistant lenses for the minor named above. Despite this warning, I have chosen to decline these lenses. I assume full responsibility for this decision and hold this practice harmless for any injuries that may occur as a result of using non-impact-resistant lenses.</text:p>
      <text:p text:style-name="P2"><text:span text:style-name="T1">Parent/Guardian Signature:</text:span> _____________________________ <text:span text:style-name="T1">Date:</text:span> ___/___/____</text:p>
      <text:p text:style-name="P3"><text:span text:style-name="T1">Witness:</text:span> _____________________________</text:p>
      <text:p text:style-name="P3">----------------------- <text:span text:style-name="T2">OFFICE USE ONLY: CUT HERE</text:span> ------------------------</text:p>
      <text:p text:style-name="P3"/>
      <text:p text:style-name="P1">DUTY TO WARN &amp; INFORMED REFUSAL OF POLYCARBONATE LENSES</text:p>
      <text:p text:style-name="P2"><text:span text:style-name="T1">Patient Name:</text:span> __________________________ <text:span text:style-name="T1">DOB:</text:span> ___/___/____ <text:span text:style-name="T1">Date:</text:span> ___/___/____</text:p>
      <text:p text:style-name="P2"><text:span text:style-name="T1">Parent/Guardian Name:</text:span> ________________________________</text:p>
      <text:p text:style-name="P2"><text:span text:style-name="T1">Professional Recommendation</text:span> This office recommends, in accordance with national safety standards, that all patients under the age of 18 be fitted with <text:span text:style-name="T1">polycarbonate</text:span> or <text:span text:style-name="T1">Trivex</text:span> lenses. These materials are impact-resistant and provide the highest level of eye protection. Standard plastic (CR-39) and glass lenses are <text:span text:style-name="T1">not</text:span> impact-resistant and may shatter into sharp shards upon impact, causing serious injury or blindness.</text:p>
      <text:p text:style-name="P2"><text:span text:style-name="T1">Waiver and Release</text:span> I acknowledge that I have been informed of the recommendation to purchase impact-resistant lenses for the minor named above. Despite this warning, I have chosen to decline these lenses. I assume full responsibility for this decision and hold this practice harmless for any injuries that may occur as a result of using non-impact-resistant lenses.</text:p>
      <text:p text:style-name="P2"><text:span text:style-name="T1">Parent/Guardian Signature:</text:span> _____________________________ <text:span text:style-name="T1">Date:</text:span> ___/___/____</text:p>
      <text:p text:style-name="P2"><text:span text:style-name="T1">Witness:</text:span> _____________________________</text:p>
      <text:p text:style-name="P2"/>
      <text:p text:style-name="P4"><text:soft-page-break/>DEBER DE ADVERTENCIA Y RECHAZO INFORMADO DE LENTES DE POLICARBONATO</text:p>
      <text:p text:style-name="P5"><text:span text:style-name="T1">Nombre del Paciente:</text:span> ________________________ <text:span text:style-name="T1">Fecha de Nac.:</text:span> ___/___/____ </text:p>
      <text:p text:style-name="P5"><text:span text:style-name="T1">Fecha:</text:span> ___/___/____</text:p>
      <text:p text:style-name="P6"><text:span text:style-name="T1">Nombre del Padre/Tutor:</text:span> ________________________________</text:p>
      <text:p text:style-name="P6"><text:span text:style-name="T1">Recomendación Profesional</text:span> Esta oficina recomienda, de acuerdo con las normas de seguridad nacionales, que todos los pacientes menores de 18 años usen lentes de <text:span text:style-name="T1">policarbonato</text:span> o <text:span text:style-name="T1">Trivex</text:span>. Estos materiales son resistentes a los impactos y brindan el nivel más alto de protección ocular. Los lentes de plástico estándar (CR-39) y de vidrio <text:span text:style-name="T1">no</text:span> son resistentes a los impactos y pueden romperse en fragmentos afilados, causando lesiones oculares graves o ceguera.</text:p>
      <text:p text:style-name="P6"><text:span text:style-name="T1">Renuncia y Exención de Responsabilidad</text:span> Reconozco que se me ha informado de la recomendación de comprar lentes resistentes a impactos para el menor mencionado anteriormente. A pesar de esta advertencia, he decidido rechazar estos lentes. Asumo toda la responsabilidad por esta decisión y eximo a esta oficina de responsabilidad por cualquier lesión que pueda ocurrir como resultado del uso de lentes no resistentes a impactos.</text:p>
      <text:p text:style-name="P6"><text:span text:style-name="T1">Firma del Padre/Tutor:</text:span> _____________________________ <text:span text:style-name="T1">Fecha:</text:span> ___/___/____</text:p>
      <text:p text:style-name="P6"><text:span text:style-name="T1">Testigo:</text:span> _____________________________</text:p>
      <text:p text:style-name="P5">------------------ <text:span text:style-name="T2">SOLO PARA USO DE OFICINA: CORTAR AQUÍ</text:span> ----------------------</text:p>
      <text:p text:style-name="P7"/>
      <text:p text:style-name="P7">DEBER DE ADVERTENCIA Y RECHAZO INFORMADO DE LENTES DE POLICARBONATO</text:p>
      <text:p text:style-name="P5"><text:span text:style-name="T1">Nombre del Paciente:</text:span> ________________________ <text:span text:style-name="T1">Fecha de Nac.:</text:span> ___/___/____ </text:p>
      <text:p text:style-name="P5"><text:span text:style-name="T1">Fecha:</text:span> ___/___/____</text:p>
      <text:p text:style-name="P6"><text:span text:style-name="T1">Nombre del Padre/Tutor:</text:span> ________________________________</text:p>
      <text:p text:style-name="P6"><text:span text:style-name="T1">Recomendación Profesional</text:span> Esta oficina recomienda, de acuerdo con las normas de seguridad nacionales, que todos los pacientes menores de 18 años usen lentes de <text:span text:style-name="T1">policarbonato</text:span> o <text:span text:style-name="T1">Trivex</text:span>. Estos materiales son resistentes a los impactos y brindan el nivel más alto de protección ocular. Los lentes de plástico estándar (CR-39) y de vidrio <text:span text:style-name="T1">no</text:span> son resistentes a los impactos y pueden romperse en fragmentos afilados, causando lesiones oculares graves o ceguera.</text:p>
      <text:p text:style-name="P6"><text:span text:style-name="T1">Renuncia y Exención de Responsabilidad</text:span> Reconozco que se me ha informado de la recomendación de comprar lentes resistentes a impactos para el menor mencionado anteriormente. A pesar de esta advertencia, he decidido rechazar estos lentes. Asumo toda la responsabilidad por esta decisión y eximo a esta oficina de responsabilidad por cualquier lesión que pueda ocurrir como resultado del uso de lentes no resistentes a impactos.</text:p>
      <text:p text:style-name="P6"><text:span text:style-name="T1">Firma del Padre/Tutor:</text:span> _____________________________ <text:span text:style-name="T1">Fecha:</text:span> ___/___/____</text:p>
      <text:p text:style-name="P6"><text:span text:style-name="T1">Testigo:</text:span> __________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ef" svg:font-family="Alef" style:font-adornments="Bold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w Cen MT Condensed Extra Bold" svg:font-family="'Tw Cen MT Condensed Extra Bold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w Cen MT Condensed Extra Bold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w Cen MT Condensed Extra Bold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w Cen MT Condensed Extra Bold" fo:font-family="'Tw Cen MT Condensed Extra Bold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w Cen MT Condensed Extra Bold" fo:font-family="'Tw Cen MT Condensed Extra Bold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w Cen MT Condensed Extra Bold" fo:font-family="'Tw Cen MT Condensed Extra Bold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w Cen MT Condensed Extra Bold" fo:font-family="'Tw Cen MT Condensed Extra Bold'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4:53:42.047014800</meta:creation-date>
    <dc:date>2026-01-23T15:03:23.162552900</dc:date>
    <meta:editing-duration>PT9M41S</meta:editing-duration>
    <meta:editing-cycles>1</meta:editing-cycles>
    <meta:document-statistic meta:table-count="0" meta:image-count="0" meta:object-count="0" meta:page-count="2" meta:paragraph-count="32" meta:word-count="636" meta:character-count="4729" meta:non-whitespace-character-count="4123"/>
    <meta:generator>LibreOffice/25.8.1.1$Windows_X86_64 LibreOffice_project/54047653041915e595ad4e45cccea684809c77b5</meta:generator>
  </office:meta>
</office:document-meta>
</file>