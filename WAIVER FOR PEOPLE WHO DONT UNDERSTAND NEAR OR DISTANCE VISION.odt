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w Cen MT" svg:font-family="'Tw Cen MT'" style:font-adornments="Bold" style:font-family-generic="swiss" style:font-pitch="variable"/>
    <style:font-face style:name="Tw Cen MT Condensed Extra Bold" svg:font-family="'Tw Cen MT Condensed Extra Bold'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style:font-name="Tw Cen MT" fo:font-size="16pt" fo:font-style="normal" style:text-underline-style="none" fo:font-weight="bold" officeooo:rsid="001c4b54" officeooo:paragraph-rsid="001b127e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style:font-name="Tw Cen MT" fo:font-size="13pt" fo:font-style="normal" style:text-underline-style="none" fo:font-weight="bold" officeooo:rsid="001c4b54" officeooo:paragraph-rsid="001b127e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style:font-name="Tw Cen MT" fo:font-size="13pt" fo:font-weight="normal" officeooo:rsid="001c4b54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text-transform="uppercase" style:font-name="Tw Cen MT" fo:font-size="13pt" fo:font-style="normal" style:text-underline-style="none" fo:font-weight="bold" officeooo:rsid="001c4b54" officeooo:paragraph-rsid="001b127e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paragraph-properties fo:text-align="start" style:justify-single-word="false"/>
      <style:text-properties fo:text-transform="uppercase" style:font-name="Tw Cen MT" fo:font-size="13pt" fo:font-style="normal" style:text-underline-style="none" fo:font-weight="bold" officeooo:rsid="001cf377" officeooo:paragraph-rsid="001cf377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style:font-name="Tw Cen MT" fo:font-size="16pt" fo:font-style="normal" style:text-underline-style="none" fo:font-weight="bold" officeooo:rsid="001c4b54" officeooo:paragraph-rsid="001cf377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style:font-name="Tw Cen MT" fo:font-size="13pt" fo:font-style="normal" style:text-underline-style="none" fo:font-weight="bold" officeooo:rsid="001c4b54" officeooo:paragraph-rsid="001cf377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style:font-name="Tw Cen MT" fo:font-size="13pt" fo:font-weight="normal" officeooo:rsid="001c4b54" officeooo:paragraph-rsid="001cf377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text-transform="uppercase" style:font-name="Tw Cen MT" fo:font-size="13pt" fo:font-style="normal" style:text-underline-style="none" fo:font-weight="bold" officeooo:rsid="001c4b54" officeooo:paragraph-rsid="001cf377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style:font-name="Tw Cen MT" fo:font-size="16pt" fo:font-style="normal" style:text-underline-style="none" fo:font-weight="bold" officeooo:rsid="001cf377" officeooo:paragraph-rsid="001cf377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Text_20_body">
      <style:text-properties fo:font-variant="normal" fo:text-transform="none" style:font-name="Tw Cen MT" fo:font-size="13pt" fo:font-weight="normal" officeooo:rsid="001cf377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style:font-name="Tw Cen MT" fo:font-size="13pt" fo:font-style="normal" style:text-underline-style="none" fo:font-weight="bold" officeooo:rsid="001cf377" officeooo:paragraph-rsid="001cf377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text-properties fo:font-variant="normal" fo:text-transform="none" style:font-name="Tw Cen MT" fo:font-size="13pt" fo:font-weight="normal" officeooo:rsid="001cf377" officeooo:paragraph-rsid="001cf377" style:font-size-asian="13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D CONSENT FOR SINGLE VISION LENSES</text:p>
      <text:p text:style-name="P2"/>
      <text:p text:style-name="P3"><text:span text:style-name="T1">Lens Selection</text:span>: I have elected to purchase Single Vision lenses instead of the recommended Bifocal, Trifocal, or Progressive (No-Line) lenses. I am choosing the following specific function:</text:p>
      <text:p text:style-name="P3">[ ] <text:span text:style-name="T2">Distance Only</text:span>: I understand that these glasses are for seeing far away (driving, TV, cinema). I will not be able to read or see clearly up close while wearing them.</text:p>
      <text:p text:style-name="P3">[ ] <text:span text:style-name="T3">Reading/Near Only</text:span>: I understand that these glasses are for near tasks only (reading, phone, computer). I will not be able to see clearly at a distance and should not drive while wearing them.</text:p>
      <text:p text:style-name="P3"><text:span text:style-name="T4">Remake Policy Acknowledgement</text:span>: By declining the recommended multifocal lenses, I understand that I am waiving my right to a lens restyle at no cost. If I later decide I require bifocals or progressive lenses,<text:span text:style-name="T3"> I will be responsible for the full cost of the new lenses</text:span>, and no refund or credit will be issued for the single vision lenses originally ordered.</text:p>
      <text:p text:style-name="P4"/>
      <text:p text:style-name="P5">PATIENT SIGNATURE:_________________________________DATE:___/____/_______</text:p>
      <text:p text:style-name="P5"/>
      <text:p text:style-name="P5"/>
      <text:p text:style-name="P6">INFORMED CONSENT FOR SINGLE VISION LENSES</text:p>
      <text:p text:style-name="P7"/>
      <text:p text:style-name="P8"><text:span text:style-name="T1">Lens Selection</text:span>: I have elected to purchase Single Vision lenses instead of the recommended Bifocal, Trifocal, or Progressive (No-Line) lenses. I am choosing the following specific function:</text:p>
      <text:p text:style-name="P8">[ ] <text:span text:style-name="T2">Distance Only</text:span>: I understand that these glasses are for seeing far away (driving, TV, cinema). I will not be able to read or see clearly up close while wearing them.</text:p>
      <text:p text:style-name="P8">[ ] <text:span text:style-name="T3">Reading/Near Only</text:span>: I understand that these glasses are for near tasks only (reading, phone, computer). I will not be able to see clearly at a distance and should not drive while wearing them.</text:p>
      <text:p text:style-name="P8"><text:span text:style-name="T4">Remake Policy Acknowledgement</text:span>: By declining the recommended multifocal lenses, I understand that I am waiving my right to a lens restyle at no cost. If I later decide I require bifocals or progressive lenses,<text:span text:style-name="T3"> I will be responsible for the full cost of the new lenses</text:span>, and no refund or credit will be issued for the single vision lenses originally ordered.</text:p>
      <text:p text:style-name="P9"/>
      <text:p text:style-name="P5">PATIENT SIGNATURE:_________________________________DATE:___/____/_______</text:p>
      <text:p text:style-name="P5"><text:s text:c="1535"/></text:p>
      <text:p text:style-name="P10"><text:soft-page-break/>CONSENTIMIENTO INFORMADO PARA LENTES DE VISIÓN SENCILLA</text:p>
      <text:p text:style-name="P11"><text:span text:style-name="T1">Selección de Lentes</text:span>: He elegido comprar lentes de Visión Sencilla (Monofocales) en lugar de los lentes Bifocales, Trifocales o Progresivos (sin línea) que me fueron recomendados. Elijo la siguiente función específica:</text:p>
      <text:p text:style-name="P11">[ ] <text:span text:style-name="T3">Solo para Distancia</text:span> (Lejos): Entiendo que estos anteojos son para ver de lejos (conducir, televisión, cine). No podré leer ni ver claramente de cerca mientras los use.</text:p>
      <text:p text:style-name="P11">[ ] <text:span text:style-name="T3">Solo para Lectura</text:span> (Cerca): Entiendo que estos anteojos son solo para tareas de visión cercana (leer, teléfono, computadora). No podré ver claramente a distancia y no debo conducir mientras los use.</text:p>
      <text:p text:style-name="P11"><text:span text:style-name="T4">Aceptación de la Política de Cambios</text:span>: Al rechazar los lentes multifocales recomendados, entiendo que renuncio a mi derecho a un cambio de estilo de lente sin costo. Si más adelante decido que necesito lentes bifocales o progresivos, seré responsable del costo total de los nuevos lentes. No se emitirán reembolsos ni crédito por los lentes de visión sencilla ordenados originalmente.</text:p>
      <text:p text:style-name="P12"/>
      <text:p text:style-name="P12">Firma del Paciente:_______________________________________Fecha:____/____/_______</text:p>
      <text:p text:style-name="P12"/>
      <text:p text:style-name="P12"/>
      <text:p text:style-name="P10">CONSENTIMIENTO INFORMADO PARA LENTES DE VISIÓN SENCILLA</text:p>
      <text:p text:style-name="P13"><text:span text:style-name="T1">Selección de Lentes</text:span>: He elegido comprar lentes de Visión Sencilla (Monofocales) en lugar de los lentes Bifocales, Trifocales o Progresivos (sin línea) que me fueron recomendados. Elijo la siguiente función específica:</text:p>
      <text:p text:style-name="P13">[ ] <text:span text:style-name="T3">Solo para Distancia</text:span> (Lejos): Entiendo que estos anteojos son para ver de lejos (conducir, televisión, cine). No podré leer ni ver claramente de cerca mientras los use.</text:p>
      <text:p text:style-name="P13">[ ] <text:span text:style-name="T3">Solo para Lectura</text:span> (Cerca): Entiendo que estos anteojos son solo para tareas de visión cercana (leer, teléfono, computadora). No podré ver claramente a distancia y no debo conducir mientras los use.</text:p>
      <text:p text:style-name="P13"><text:span text:style-name="T4">Aceptación de la Política de Cambios</text:span>: Al rechazar los lentes multifocales recomendados, entiendo que renuncio a mi derecho a un cambio de estilo de lente sin costo. Si más adelante decido que necesito lentes bifocales o progresivos, seré responsable del costo total de los nuevos lentes. No se emitirán reembolsos ni crédito por los lentes de visión sencilla ordenados originalmente.</text:p>
      <text:p text:style-name="P12"/>
      <text:p text:style-name="P12">Firma del Paciente:_______________________________________Fecha:____/____/_______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w Cen MT" svg:font-family="'Tw Cen MT'" style:font-adornments="Bold" style:font-family-generic="swiss" style:font-pitch="variable"/>
    <style:font-face style:name="Tw Cen MT Condensed Extra Bold" svg:font-family="'Tw Cen MT Condensed Extra Bold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w Cen MT Condensed Extra Bold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w Cen MT Condensed Extra Bold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w Cen MT Condensed Extra Bold" fo:font-family="'Tw Cen MT Condensed Extra Bold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w Cen MT Condensed Extra Bold" fo:font-family="'Tw Cen MT Condensed Extra Bold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w Cen MT Condensed Extra Bold" fo:font-family="'Tw Cen MT Condensed Extra Bold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w Cen MT Condensed Extra Bold" fo:font-family="'Tw Cen MT Condensed Extra Bold'"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5:30:04.917249700</meta:creation-date>
    <dc:date>2026-01-28T14:43:30.314168800</dc:date>
    <meta:editing-duration>PT2H19M36S</meta:editing-duration>
    <meta:editing-cycles>2</meta:editing-cycles>
    <meta:generator>LibreOffice/25.8.1.1$Windows_X86_64 LibreOffice_project/54047653041915e595ad4e45cccea684809c77b5</meta:generator>
    <meta:print-date>2026-01-28T12:13:20.758654200</meta:print-date>
    <meta:document-statistic meta:table-count="0" meta:image-count="0" meta:object-count="0" meta:page-count="2" meta:paragraph-count="25" meta:word-count="652" meta:character-count="5791" meta:non-whitespace-character-count="3628"/>
  </office:meta>
</office:document-meta>
</file>